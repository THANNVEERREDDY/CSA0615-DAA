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/>
    </style:style>
    <style:style style:family="table-cell" style:name="a5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53">
      <style:text-properties fo:language="en" fo:country="IN"/>
    </style:style>
    <style:style style:family="paragraph" style:name="a554">
      <style:paragraph-properties/>
    </style:style>
    <style:style style:family="table-cell" style:name="a5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56">
      <style:text-properties fo:language="en" fo:country="IN"/>
    </style:style>
    <style:style style:family="paragraph" style:name="a557">
      <style:paragraph-properties/>
    </style:style>
    <style:style style:family="table-cell" style:name="a5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59">
      <style:table-row-properties style:row-height="0.61126in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language="en" fo:country="IN"/>
    </style:style>
    <style:style style:family="paragraph" style:name="a561">
      <style:paragraph-properties/>
    </style:style>
    <style:style style:family="table-cell" style:name="a5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63">
      <style:text-properties fo:language="en" fo:country="IN"/>
    </style:style>
    <style:style style:family="paragraph" style:name="a564">
      <style:paragraph-properties/>
    </style:style>
    <style:style style:family="table-cell" style:name="a5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66">
      <style:text-properties fo:language="en" fo:country="IN"/>
    </style:style>
    <style:style style:family="paragraph" style:name="a567">
      <style:paragraph-properties/>
    </style:style>
    <style:style style:family="table-cell" style:name="a5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69">
      <style:text-properties fo:language="en" fo:country="IN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06">
      <style:table-properties style:writing-mode="lr-tb"/>
    </style:style>
    <style:style style:family="table-column" style:name="a407">
      <style:table-column-properties style:column-width="3.83333in"/>
    </style:style>
    <style:style style:family="table-column" style:name="a408">
      <style:table-column-properties style:column-width="3.83333in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409">
      <style:table-column-properties style:column-width="3.83333in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language="en" fo:country="IN"/>
    </style:style>
    <style:style style:family="paragraph" style:name="a3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language="en" fo:country="IN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/>
    </style:style>
    <style:style style:family="table-cell" style:name="a6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07">
      <style:text-properties fo:language="en" fo:country="IN"/>
    </style:style>
    <style:style style:family="paragraph" style:name="a608">
      <style:paragraph-properties/>
    </style:style>
    <style:style style:family="paragraph" style:name="a570">
      <style:paragraph-properties/>
    </style:style>
    <style:style style:family="table-cell" style:name="a6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2">
      <style:text-properties fo:language="en" fo:country="IN"/>
    </style:style>
    <style:style style:family="paragraph" style:name="a573">
      <style:paragraph-properties/>
    </style:style>
    <style:style style:family="table-cell" style:name="a5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5">
      <style:text-properties fo:language="en" fo:country="IN"/>
    </style:style>
    <style:style style:family="paragraph" style:name="a576">
      <style:paragraph-properties/>
    </style:style>
    <style:style style:family="table-cell" style:name="a5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78">
      <style:table-row-properties style:row-height="0.61126in"/>
    </style:style>
    <style:style style:family="text" style:name="a579">
      <style:text-properties fo:language="en" fo:country="IN"/>
    </style:style>
    <style:style style:family="table-row" style:name="a410">
      <style:table-row-properties style:row-height="0.57665in"/>
    </style:style>
    <style:style style:family="text" style:name="a411">
      <style:text-properties fo:language="en" fo:country="IN"/>
    </style:style>
    <style:style style:family="paragraph" style:name="a412">
      <style:paragraph-properties/>
    </style:style>
    <style:style style:family="table-cell" style:name="a4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14">
      <style:text-properties fo:language="en" fo:country="IN"/>
    </style:style>
    <style:style style:family="paragraph" style:name="a415">
      <style:paragraph-properties/>
    </style:style>
    <style:style style:family="table-cell" style:name="a4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17">
      <style:text-properties fo:language="en" fo:country="IN"/>
    </style:style>
    <style:style style:family="paragraph" style:name="a418">
      <style:paragraph-properties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language="en" fo:country="IN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13">
      <style:text-properties fo:language="en" fo:country="IN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16">
      <style:table-row-properties style:row-height="0.61126in"/>
    </style:style>
    <style:style style:family="text" style:name="a617">
      <style:text-properties fo:language="en" fo:country="IN"/>
    </style:style>
    <style:style style:family="paragraph" style:name="a618">
      <style:paragraph-properties/>
    </style:style>
    <style:style style:family="paragraph" style:name="a580">
      <style:paragraph-properties/>
    </style:style>
    <style:style style:family="table-cell" style:name="a6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82">
      <style:text-properties fo:language="en" fo:country="IN"/>
    </style:style>
    <style:style style:family="paragraph" style:name="a583">
      <style:paragraph-properties/>
    </style:style>
    <style:style style:family="table-cell" style:name="a5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85">
      <style:text-properties fo:language="en" fo:country="IN"/>
    </style:style>
    <style:style style:family="paragraph" style:name="a586">
      <style:paragraph-properties/>
    </style:style>
    <style:style style:family="table-cell" style:name="a5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88">
      <style:text-properties fo:language="en" fo:country="IN"/>
    </style:style>
    <style:style style:family="paragraph" style:name="a589">
      <style:paragraph-properties/>
    </style:style>
    <style:style style:family="table-row" style:name="a420">
      <style:table-row-properties style:row-height="0.57665in"/>
    </style:style>
    <style:style style:family="text" style:name="a421">
      <style:text-properties fo:language="en" fo:country="IN"/>
    </style:style>
    <style:style style:family="paragraph" style:name="a422">
      <style:paragraph-properties/>
    </style:style>
    <style:style style:family="table-cell" style:name="a4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24">
      <style:text-properties fo:language="en" fo:country="IN"/>
    </style:style>
    <style:style style:family="paragraph" style:name="a425">
      <style:paragraph-properties/>
    </style:style>
    <style:style style:family="table-cell" style:name="a4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27">
      <style:text-properties fo:language="en" fo:country="IN"/>
    </style:style>
    <style:style style:family="paragraph" style:name="a428">
      <style:paragraph-properties/>
    </style:style>
    <style:style style:family="table-cell" style:name="a4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language="en" fo:country="IN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/>
    </style:style>
    <style:style style:family="table-cell" style:name="a6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language="en" fo:country="IN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/>
    </style:style>
    <style:style style:family="table-cell" style:name="a6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6">
      <style:text-properties fo:language="en" fo:country="IN"/>
    </style:style>
    <style:style style:family="paragraph" style:name="a627">
      <style:paragraph-properties/>
    </style:style>
    <style:style style:family="table-cell" style:name="a6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9">
      <style:text-properties fo:language="en" fo:country="IN"/>
    </style:style>
    <style:style style:family="text" style:name="a591">
      <style:text-properties fo:language="en" fo:country="IN"/>
    </style:style>
    <style:style style:family="paragraph" style:name="a592">
      <style:paragraph-properties/>
    </style:style>
    <style:style style:family="table-cell" style:name="a5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94">
      <style:text-properties fo:language="en" fo:country="IN"/>
    </style:style>
    <style:style style:family="paragraph" style:name="a595">
      <style:paragraph-properties/>
    </style:style>
    <style:style style:family="table-cell" style:name="a5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97">
      <style:table-row-properties style:row-height="0.61126in"/>
    </style:style>
    <style:style style:family="text" style:name="a598">
      <style:text-properties fo:language="en" fo:country="IN"/>
    </style:style>
    <style:style style:family="paragraph" style:name="a599">
      <style:paragraph-properties/>
    </style:style>
    <style:style style:family="table-row" style:name="a430">
      <style:table-row-properties style:row-height="0.57665in"/>
    </style:style>
    <style:style style:family="text" style:name="a431">
      <style:text-properties fo:language="en" fo:country="IN"/>
    </style:style>
    <style:style style:family="paragraph" style:name="a432">
      <style:paragraph-properties/>
    </style:style>
    <style:style style:family="table-cell" style:name="a4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34">
      <style:text-properties fo:language="en" fo:country="IN"/>
    </style:style>
    <style:style style:family="paragraph" style:name="a435">
      <style:paragraph-properties/>
    </style:style>
    <style:style style:family="table-cell" style:name="a4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37">
      <style:text-properties fo:language="en" fo:country="IN"/>
    </style:style>
    <style:style style:family="paragraph" style:name="a438">
      <style:paragraph-properties/>
    </style:style>
    <style:style style:family="table-cell" style:name="a4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30">
      <style:paragraph-properties/>
    </style:style>
    <style:style style:family="table-cell" style:name="a6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2">
      <style:text-properties fo:language="en" fo:country="IN"/>
    </style:style>
    <style:style style:family="paragraph" style:name="a633">
      <style:paragraph-properties/>
    </style:style>
    <style:style style:family="table-cell" style:name="a6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35">
      <style:table-row-properties style:row-height="0.61126in"/>
    </style:style>
    <style:style style:family="text" style:name="a636">
      <style:text-properties fo:language="en" fo:country="IN"/>
    </style:style>
    <style:style style:family="paragraph" style:name="a637">
      <style:paragraph-properties/>
    </style:style>
    <style:style style:family="table-cell" style:name="a6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9">
      <style:text-properties fo:language="en" fo:country="IN"/>
    </style:style>
    <style:style style:family="table-row" style:name="a440">
      <style:table-row-properties style:row-height="0.56875in"/>
    </style:style>
    <style:style style:family="text" style:name="a441">
      <style:text-properties fo:language="en" fo:country="IN"/>
    </style:style>
    <style:style style:family="paragraph" style:name="a442">
      <style:paragraph-properties/>
    </style:style>
    <style:style style:family="table-cell" style:name="a4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44">
      <style:text-properties fo:language="en" fo:country="IN"/>
    </style:style>
    <style:style style:family="paragraph" style:name="a445">
      <style:paragraph-properties/>
    </style:style>
    <style:style style:family="table-cell" style:name="a4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47">
      <style:text-properties fo:language="en" fo:country="IN"/>
    </style:style>
    <style:style style:family="paragraph" style:name="a448">
      <style:paragraph-properties/>
    </style:style>
    <style:style style:family="table-cell" style:name="a4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40">
      <style:paragraph-properties/>
    </style:style>
    <style:style style:family="table-cell" style:name="a6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2">
      <style:text-properties fo:language="en" fo:country="IN"/>
    </style:style>
    <style:style style:family="paragraph" style:name="a643">
      <style:paragraph-properties/>
    </style:style>
    <style:style style:family="table-cell" style:name="a6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5">
      <style:text-properties fo:language="en" fo:country="IN"/>
    </style:style>
    <style:style style:family="paragraph" style:name="a646">
      <style:paragraph-properties/>
    </style:style>
    <style:style style:family="table-cell" style:name="a6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8">
      <style:text-properties fo:language="en" fo:country="IN"/>
    </style:style>
    <style:style style:family="paragraph" style:name="a649">
      <style:paragraph-properties/>
    </style:style>
    <style:style style:family="table-row" style:name="a450">
      <style:table-row-properties style:row-height="0.57665in"/>
    </style:style>
    <style:style style:family="text" style:name="a451">
      <style:text-properties fo:language="en" fo:country="IN"/>
    </style:style>
    <style:style style:family="paragraph" style:name="a452">
      <style:paragraph-properties/>
    </style:style>
    <style:style style:family="table-cell" style:name="a4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54">
      <style:text-properties fo:language="en" fo:country="IN"/>
    </style:style>
    <style:style style:family="paragraph" style:name="a455">
      <style:paragraph-properties/>
    </style:style>
    <style:style style:family="table-cell" style:name="a4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57">
      <style:text-properties fo:language="en" fo:country="IN"/>
    </style:style>
    <style:style style:family="paragraph" style:name="a458">
      <style:paragraph-properties/>
    </style:style>
    <style:style style:family="table-cell" style:name="a4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51">
      <style:text-properties fo:language="en" fo:country="IN"/>
    </style:style>
    <style:style style:family="paragraph" style:name="a652">
      <style:paragraph-properties/>
    </style:style>
    <style:style style:family="table-cell" style:name="a6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60">
      <style:table-row-properties style:row-height="0.99531in"/>
    </style:style>
    <style:style style:family="text" style:name="a461">
      <style:text-properties fo:language="en" fo:country="IN"/>
    </style:style>
    <style:style style:family="paragraph" style:name="a462">
      <style:paragraph-properties/>
    </style:style>
    <style:style style:family="table-cell" style:name="a4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64">
      <style:text-properties fo:language="en" fo:country="IN"/>
    </style:style>
    <style:style style:family="paragraph" style:name="a465">
      <style:paragraph-properties/>
    </style:style>
    <style:style style:family="table-cell" style:name="a4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67">
      <style:text-properties fo:language="en" fo:country="IN"/>
    </style:style>
    <style:style style:family="paragraph" style:name="a468">
      <style:paragraph-properties/>
    </style:style>
    <style:style style:family="table-cell" style:name="a4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14">
      <style:table-properties style:writing-mode="lr-tb"/>
    </style:style>
    <style:style style:family="table-column" style:name="a515">
      <style:table-column-properties style:column-width="1.91667in"/>
    </style:style>
    <style:style style:family="table-column" style:name="a516">
      <style:table-column-properties style:column-width="1.91667in"/>
    </style:style>
    <style:style style:family="table-column" style:name="a517">
      <style:table-column-properties style:column-width="1.91667in"/>
    </style:style>
    <style:style style:family="table-column" style:name="a518">
      <style:table-column-properties style:column-width="1.91667in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19">
      <style:table-column-properties style:column-width="1.91667in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20">
      <style:table-column-properties style:column-width="1.91667in"/>
    </style:style>
    <style:style style:family="table-row" style:name="a521">
      <style:table-row-properties style:row-height="0.61126in"/>
    </style:style>
    <style:style style:family="text" style:name="a522">
      <style:text-properties fo:language="en" fo:country="IN"/>
    </style:style>
    <style:style style:family="paragraph" style:name="a523">
      <style:paragraph-properties/>
    </style:style>
    <style:style style:family="table-cell" style:name="a5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25">
      <style:text-properties fo:language="en" fo:country="IN"/>
    </style:style>
    <style:style style:family="paragraph" style:name="a526">
      <style:paragraph-properties/>
    </style:style>
    <style:style style:family="table-cell" style:name="a5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49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language="en" fo:country="IN"/>
    </style:style>
    <style:style style:family="paragraph" style:name="a529">
      <style:paragraph-properties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31">
      <style:text-properties fo:language="en" fo:country="IN"/>
    </style:style>
    <style:style style:family="paragraph" style:name="a532">
      <style:paragraph-properties/>
    </style:style>
    <style:style style:family="table-cell" style:name="a5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34">
      <style:text-properties fo:language="en" fo:country="IN"/>
    </style:style>
    <style:style style:family="paragraph" style:name="a535">
      <style:paragraph-properties/>
    </style:style>
    <style:style style:family="table-cell" style:name="a5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37">
      <style:text-properties fo:language="en" fo:country="IN"/>
    </style:style>
    <style:style style:family="paragraph" style:name="a538">
      <style:paragraph-properties/>
    </style:style>
    <style:style style:family="table-cell" style:name="a5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40">
      <style:table-row-properties style:row-height="0.61126in"/>
    </style:style>
    <style:style style:family="text" style:name="a541">
      <style:text-properties fo:language="en" fo:country="IN"/>
    </style:style>
    <style:style style:family="paragraph" style:name="a542">
      <style:paragraph-properties/>
    </style:style>
    <style:style style:family="table-cell" style:name="a5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en" fo:country="IN"/>
    </style:style>
    <style:style style:family="paragraph" style:name="a545">
      <style:paragraph-properties/>
    </style:style>
    <style:style style:family="table-cell" style:name="a5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7">
      <style:text-properties fo:language="en" fo:country="IN"/>
    </style:style>
    <style:style style:family="paragraph" style:name="a548">
      <style:paragraph-properties/>
    </style:style>
    <style:style style:family="table-cell" style:name="a5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language="en" fo:country="IN"/>
    </style:style>
    <text:list-style style:name="a71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7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8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0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9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9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0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6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9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8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9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8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9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9" draw:name="Title 1" svg:x="1.66667in" svg:y="1.22743in" svg:width="10in" svg:height="2.61111in" presentation:class="title" presentation:placeholder="false">
          <draw:text-box>
            <text:p text:style-name="a368" text:class-names="" text:cond-style-name=""><text:span text:style-name="a366" text:class-names="">Analysis of Growth Functions<text:line-break/>O(log n), O(n), O(n log n), O(n²), and O(2ⁿ)<text:line-break/></text:span><text:span text:style-name="a367" text:class-names=""/></text:p>
          </draw:text-box>
          <svg:title/>
          <svg:desc/>
        </draw:frame>
        <draw:frame draw:id="id64" presentation:style-name="a377" draw:name="Subtitle 2" svg:x="1.66667in" svg:y="3.93924in" svg:width="10in" svg:height="1.81076in" presentation:class="subtitle" presentation:placeholder="false">
          <draw:text-box>
            <text:p text:style-name="a374" text:class-names="" text:cond-style-name=""><text:span text:style-name="a370" text:class-names="">Presented by: Lella Thannveer Reddy</text:span><text:span text:style-name="a371" text:class-names=""><text:line-break/></text:span><text:span text:style-name="a372" text:class-names="">Course:</text:span><text:span text:style-name="a373" text:class-names=""><text:s text:c="1"/>Design and Analysis of Algorithms</text:span></text:p>
            <text:p text:style-name="a376" text:class-names="" text:cond-style-name=""><text:span text:style-name="a375" text:class-names=""/></text:p>
          </draw:text-box>
          <svg:title/>
          <svg:desc/>
        </draw:frame>
      </draw:page>
      <draw:page draw:name="Slide3" draw:style-name="a378" draw:master-page-name="Master1-Layout2-obj-Title-and-Content" presentation:presentation-page-layout-name="Master1-PPL2" draw:id="Slide-258">
        <draw:frame draw:id="id65" presentation:style-name="a381" draw:name="Title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9" text:class-names="">Purpose</text:span></text:p>
          </draw:text-box>
          <svg:title/>
          <svg:desc/>
        </draw:frame>
        <draw:frame draw:id="id66" presentation:style-name="a400" draw:name="Content Placeholder 2" svg:x="0.91667in" svg:y="1.99653in" svg:width="11.5in" svg:height="4.75868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2" text:class-names="">Purpose of Comparing Growth Functions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Understand how algorithm execution time changes with input size.<text:s text:c="1"/>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Compare the efficiency of different algorithms.<text:s text:c="1"/>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Predict algorithm performance for large datasets.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Select the most suitable algorithm for solving real-world problems.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draw:page>
      <draw:page draw:name="Slide4" draw:style-name="a401" draw:master-page-name="Master1-Layout2-obj-Title-and-Content" presentation:presentation-page-layout-name="Master1-PPL2" draw:id="Slide-259">
        <draw:frame draw:id="id67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Common Growth Functions</text:span><text:span text:style-name="a403" text:class-names=""/></text:p>
          </draw:text-box>
          <svg:title/>
          <svg:desc/>
        </draw:frame>
        <draw:frame draw:id="id68" draw:name="Content Placeholder 11" svg:x="0.91667in" svg:y="1.99653in" svg:width="11.49999in" svg:height="3.87066in" presentation:class="table" presentation:placeholder="false">
          <table:table table:style-name="a4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07" table:default-cell-style-name=""/>
            <table:table-column table:style-name="a408" table:default-cell-style-name=""/>
            <table:table-column table:style-name="a409" table:default-cell-style-name=""/>
            <table:table-row table:style-name="a410" table:default-cell-style-name="">
              <table:table-cell table:style-name="a413">
                <text:p text:style-name="a412" text:class-names="" text:cond-style-name=""><text:span text:style-name="a411" text:class-names="">Growth Function</text:span></text:p>
              </table:table-cell>
              <table:table-cell table:style-name="a416">
                <text:p text:style-name="a415" text:class-names="" text:cond-style-name=""><text:span text:style-name="a414" text:class-names="">Time Complexity</text:span></text:p>
              </table:table-cell>
              <table:table-cell table:style-name="a419">
                <text:p text:style-name="a418" text:class-names="" text:cond-style-name=""><text:span text:style-name="a417" text:class-names="">Example Algorithm</text:span></text:p>
              </table:table-cell>
            </table:table-row>
            <table:table-row table:style-name="a420" table:default-cell-style-name="">
              <table:table-cell table:style-name="a423">
                <text:p text:style-name="a422" text:class-names="" text:cond-style-name=""><text:span text:style-name="a421" text:class-names="">O(log n)</text:span></text:p>
              </table:table-cell>
              <table:table-cell table:style-name="a426">
                <text:p text:style-name="a425" text:class-names="" text:cond-style-name=""><text:span text:style-name="a424" text:class-names="">Logarithmic</text:span></text:p>
              </table:table-cell>
              <table:table-cell table:style-name="a429">
                <text:p text:style-name="a428" text:class-names="" text:cond-style-name=""><text:span text:style-name="a427" text:class-names="">Binary Search</text:span></text:p>
              </table:table-cell>
            </table:table-row>
            <table:table-row table:style-name="a430" table:default-cell-style-name="">
              <table:table-cell table:style-name="a433">
                <text:p text:style-name="a432" text:class-names="" text:cond-style-name=""><text:span text:style-name="a431" text:class-names="">O(n)</text:span></text:p>
              </table:table-cell>
              <table:table-cell table:style-name="a436">
                <text:p text:style-name="a435" text:class-names="" text:cond-style-name=""><text:span text:style-name="a434" text:class-names="">Linear</text:span></text:p>
              </table:table-cell>
              <table:table-cell table:style-name="a439">
                <text:p text:style-name="a438" text:class-names="" text:cond-style-name=""><text:span text:style-name="a437" text:class-names="">Linear Search</text:span></text:p>
              </table:table-cell>
            </table:table-row>
            <table:table-row table:style-name="a440" table:default-cell-style-name="">
              <table:table-cell table:style-name="a443">
                <text:p text:style-name="a442" text:class-names="" text:cond-style-name=""><text:span text:style-name="a441" text:class-names="">O(n log n)</text:span></text:p>
              </table:table-cell>
              <table:table-cell table:style-name="a446">
                <text:p text:style-name="a445" text:class-names="" text:cond-style-name=""><text:span text:style-name="a444" text:class-names="">Linearithmic</text:span></text:p>
              </table:table-cell>
              <table:table-cell table:style-name="a449">
                <text:p text:style-name="a448" text:class-names="" text:cond-style-name=""><text:span text:style-name="a447" text:class-names="">Merge Sort, Heap Sort</text:span></text:p>
              </table:table-cell>
            </table:table-row>
            <table:table-row table:style-name="a450" table:default-cell-style-name="">
              <table:table-cell table:style-name="a453">
                <text:p text:style-name="a452" text:class-names="" text:cond-style-name=""><text:span text:style-name="a451" text:class-names="">O(n²)</text:span></text:p>
              </table:table-cell>
              <table:table-cell table:style-name="a456">
                <text:p text:style-name="a455" text:class-names="" text:cond-style-name=""><text:span text:style-name="a454" text:class-names="">Quadratic</text:span></text:p>
              </table:table-cell>
              <table:table-cell table:style-name="a459">
                <text:p text:style-name="a458" text:class-names="" text:cond-style-name=""><text:span text:style-name="a457" text:class-names="">Bubble Sort, Selection Sort</text:span></text:p>
              </table:table-cell>
            </table:table-row>
            <table:table-row table:style-name="a460" table:default-cell-style-name="">
              <table:table-cell table:style-name="a463">
                <text:p text:style-name="a462" text:class-names="" text:cond-style-name=""><text:span text:style-name="a461" text:class-names="">O(2ⁿ)</text:span></text:p>
              </table:table-cell>
              <table:table-cell table:style-name="a466">
                <text:p text:style-name="a465" text:class-names="" text:cond-style-name=""><text:span text:style-name="a464" text:class-names="">Exponential</text:span></text:p>
              </table:table-cell>
              <table:table-cell table:style-name="a469">
                <text:p text:style-name="a468" text:class-names="" text:cond-style-name=""><text:span text:style-name="a467" text:class-names="">Recursive Fibonacci, Subset Generation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5" draw:style-name="a470" draw:master-page-name="Master1-Layout2-obj-Title-and-Content" presentation:presentation-page-layout-name="Master1-PPL2" draw:id="Slide-260">
        <draw:frame draw:id="id69" presentation:style-name="a474" draw:name="Title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Growth Function Graph<text:line-break/></text:span><text:span text:style-name="a472" text:class-names=""/></text:p>
          </draw:text-box>
          <svg:title/>
          <svg:desc/>
        </draw:frame>
        <draw:frame draw:id="id70" presentation:style-name="a508" draw:name="Content Placeholder 2" svg:x="0.54861in" svg:y="1.96875in" svg:width="11.5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y=2^x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O(log n):</text:span><text:span text:style-name="a485" text:class-names=""><text:s text:c="1"/>Slowest growth (best performance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O(n):</text:span><text:span text:style-name="a489" text:class-names=""><text:s text:c="1"/>Linear growth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O(n log n):</text:span><text:span text:style-name="a493" text:class-names=""><text:s text:c="1"/>Slightly faster than linear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O(n²):</text:span><text:span text:style-name="a497" text:class-names=""><text:s text:c="1"/>Rapid growth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0" text:class-names="">O(2ⁿ):</text:span><text:span text:style-name="a501" text:class-names=""><text:s text:c="1"/>Extremely rapid (exponential</text:span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  <draw:frame draw:id="id71" draw:style-name="a509" draw:name="Picture 4" svg:x="8.5625in" svg:y="1.27517in" svg:width="4.07292in" svg:height="4.2083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10" draw:master-page-name="Master1-Layout2-obj-Title-and-Content" presentation:presentation-page-layout-name="Master1-PPL2" draw:id="Slide-261">
        <draw:frame draw:id="id72" presentation:style-name="a513" draw:name="Title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1" text:class-names="">Comparison Table</text:span></text:p>
          </draw:text-box>
          <svg:title/>
          <svg:desc/>
        </draw:frame>
        <draw:frame draw:id="id73" draw:name="Content Placeholder 5" svg:x="0.91667in" svg:y="1.99653in" svg:width="11.50002in" svg:height="4.36756in" presentation:class="table" presentation:placeholder="false">
          <table:table table:style-name="a5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column table:style-name="a520" table:default-cell-style-name=""/>
            <table:table-row table:style-name="a521" table:default-cell-style-name="">
              <table:table-cell table:style-name="a524">
                <text:p text:style-name="a523" text:class-names="" text:cond-style-name=""><text:span text:style-name="a522" text:class-names="">Input (n)</text:span></text:p>
              </table:table-cell>
              <table:table-cell table:style-name="a527">
                <text:p text:style-name="a526" text:class-names="" text:cond-style-name=""><text:span text:style-name="a525" text:class-names="">O(log n)</text:span></text:p>
              </table:table-cell>
              <table:table-cell table:style-name="a530">
                <text:p text:style-name="a529" text:class-names="" text:cond-style-name=""><text:span text:style-name="a528" text:class-names="">O(n)</text:span></text:p>
              </table:table-cell>
              <table:table-cell table:style-name="a533">
                <text:p text:style-name="a532" text:class-names="" text:cond-style-name=""><text:span text:style-name="a531" text:class-names="">O(n log n)</text:span></text:p>
              </table:table-cell>
              <table:table-cell table:style-name="a536">
                <text:p text:style-name="a535" text:class-names="" text:cond-style-name=""><text:span text:style-name="a534" text:class-names="">O(n²)</text:span></text:p>
              </table:table-cell>
              <table:table-cell table:style-name="a539">
                <text:p text:style-name="a538" text:class-names="" text:cond-style-name=""><text:span text:style-name="a537" text:class-names="">O(2ⁿ)</text:span></text:p>
              </table:table-cell>
            </table:table-row>
            <table:table-row table:style-name="a540" table:default-cell-style-name="">
              <table:table-cell table:style-name="a543">
                <text:p text:style-name="a542" text:class-names="" text:cond-style-name=""><text:span text:style-name="a541" text:class-names="">2</text:span></text:p>
              </table:table-cell>
              <table:table-cell table:style-name="a546">
                <text:p text:style-name="a545" text:class-names="" text:cond-style-name=""><text:span text:style-name="a544" text:class-names="">1</text:span></text:p>
              </table:table-cell>
              <table:table-cell table:style-name="a549">
                <text:p text:style-name="a548" text:class-names="" text:cond-style-name=""><text:span text:style-name="a547" text:class-names="">2</text:span></text:p>
              </table:table-cell>
              <table:table-cell table:style-name="a552">
                <text:p text:style-name="a551" text:class-names="" text:cond-style-name=""><text:span text:style-name="a550" text:class-names="">2</text:span></text:p>
              </table:table-cell>
              <table:table-cell table:style-name="a555">
                <text:p text:style-name="a554" text:class-names="" text:cond-style-name=""><text:span text:style-name="a553" text:class-names="">4</text:span></text:p>
              </table:table-cell>
              <table:table-cell table:style-name="a558">
                <text:p text:style-name="a557" text:class-names="" text:cond-style-name=""><text:span text:style-name="a556" text:class-names="">4</text:span></text:p>
              </table:table-cell>
            </table:table-row>
            <table:table-row table:style-name="a559" table:default-cell-style-name="">
              <table:table-cell table:style-name="a562">
                <text:p text:style-name="a561" text:class-names="" text:cond-style-name=""><text:span text:style-name="a560" text:class-names="">4</text:span></text:p>
              </table:table-cell>
              <table:table-cell table:style-name="a565">
                <text:p text:style-name="a564" text:class-names="" text:cond-style-name=""><text:span text:style-name="a563" text:class-names="">2</text:span></text:p>
              </table:table-cell>
              <table:table-cell table:style-name="a568">
                <text:p text:style-name="a567" text:class-names="" text:cond-style-name=""><text:span text:style-name="a566" text:class-names="">4</text:span></text:p>
              </table:table-cell>
              <table:table-cell table:style-name="a571">
                <text:p text:style-name="a570" text:class-names="" text:cond-style-name=""><text:span text:style-name="a569" text:class-names="">8</text:span></text:p>
              </table:table-cell>
              <table:table-cell table:style-name="a574">
                <text:p text:style-name="a573" text:class-names="" text:cond-style-name=""><text:span text:style-name="a572" text:class-names="">16</text:span></text:p>
              </table:table-cell>
              <table:table-cell table:style-name="a577">
                <text:p text:style-name="a576" text:class-names="" text:cond-style-name=""><text:span text:style-name="a575" text:class-names="">16</text:span></text:p>
              </table:table-cell>
            </table:table-row>
            <table:table-row table:style-name="a578" table:default-cell-style-name="">
              <table:table-cell table:style-name="a581">
                <text:p text:style-name="a580" text:class-names="" text:cond-style-name=""><text:span text:style-name="a579" text:class-names="">8</text:span></text:p>
              </table:table-cell>
              <table:table-cell table:style-name="a584">
                <text:p text:style-name="a583" text:class-names="" text:cond-style-name=""><text:span text:style-name="a582" text:class-names="">3</text:span></text:p>
              </table:table-cell>
              <table:table-cell table:style-name="a587">
                <text:p text:style-name="a586" text:class-names="" text:cond-style-name=""><text:span text:style-name="a585" text:class-names="">8</text:span></text:p>
              </table:table-cell>
              <table:table-cell table:style-name="a590">
                <text:p text:style-name="a589" text:class-names="" text:cond-style-name=""><text:span text:style-name="a588" text:class-names="">24</text:span></text:p>
              </table:table-cell>
              <table:table-cell table:style-name="a593">
                <text:p text:style-name="a592" text:class-names="" text:cond-style-name=""><text:span text:style-name="a591" text:class-names="">64</text:span></text:p>
              </table:table-cell>
              <table:table-cell table:style-name="a596">
                <text:p text:style-name="a595" text:class-names="" text:cond-style-name=""><text:span text:style-name="a594" text:class-names="">256</text:span></text:p>
              </table:table-cell>
            </table:table-row>
            <table:table-row table:style-name="a597" table:default-cell-style-name="">
              <table:table-cell table:style-name="a600">
                <text:p text:style-name="a599" text:class-names="" text:cond-style-name=""><text:span text:style-name="a598" text:class-names="">16</text:span></text:p>
              </table:table-cell>
              <table:table-cell table:style-name="a603">
                <text:p text:style-name="a602" text:class-names="" text:cond-style-name=""><text:span text:style-name="a601" text:class-names="">4</text:span></text:p>
              </table:table-cell>
              <table:table-cell table:style-name="a606">
                <text:p text:style-name="a605" text:class-names="" text:cond-style-name=""><text:span text:style-name="a604" text:class-names="">16</text:span></text:p>
              </table:table-cell>
              <table:table-cell table:style-name="a609">
                <text:p text:style-name="a608" text:class-names="" text:cond-style-name=""><text:span text:style-name="a607" text:class-names="">64</text:span></text:p>
              </table:table-cell>
              <table:table-cell table:style-name="a612">
                <text:p text:style-name="a611" text:class-names="" text:cond-style-name=""><text:span text:style-name="a610" text:class-names="">256</text:span></text:p>
              </table:table-cell>
              <table:table-cell table:style-name="a615">
                <text:p text:style-name="a614" text:class-names="" text:cond-style-name=""><text:span text:style-name="a613" text:class-names="">65,536</text:span></text:p>
              </table:table-cell>
            </table:table-row>
            <table:table-row table:style-name="a616" table:default-cell-style-name="">
              <table:table-cell table:style-name="a619">
                <text:p text:style-name="a618" text:class-names="" text:cond-style-name=""><text:span text:style-name="a617" text:class-names="">32</text:span></text:p>
              </table:table-cell>
              <table:table-cell table:style-name="a622">
                <text:p text:style-name="a621" text:class-names="" text:cond-style-name=""><text:span text:style-name="a620" text:class-names="">5</text:span></text:p>
              </table:table-cell>
              <table:table-cell table:style-name="a625">
                <text:p text:style-name="a624" text:class-names="" text:cond-style-name=""><text:span text:style-name="a623" text:class-names="">32</text:span></text:p>
              </table:table-cell>
              <table:table-cell table:style-name="a628">
                <text:p text:style-name="a627" text:class-names="" text:cond-style-name=""><text:span text:style-name="a626" text:class-names="">160</text:span></text:p>
              </table:table-cell>
              <table:table-cell table:style-name="a631">
                <text:p text:style-name="a630" text:class-names="" text:cond-style-name=""><text:span text:style-name="a629" text:class-names="">1,024</text:span></text:p>
              </table:table-cell>
              <table:table-cell table:style-name="a634">
                <text:p text:style-name="a633" text:class-names="" text:cond-style-name=""><text:span text:style-name="a632" text:class-names="">4,294,967,296</text:span></text:p>
              </table:table-cell>
            </table:table-row>
            <table:table-row table:style-name="a635" table:default-cell-style-name="">
              <table:table-cell table:style-name="a638">
                <text:p text:style-name="a637" text:class-names="" text:cond-style-name=""><text:span text:style-name="a636" text:class-names="">64</text:span></text:p>
              </table:table-cell>
              <table:table-cell table:style-name="a641">
                <text:p text:style-name="a640" text:class-names="" text:cond-style-name=""><text:span text:style-name="a639" text:class-names="">6</text:span></text:p>
              </table:table-cell>
              <table:table-cell table:style-name="a644">
                <text:p text:style-name="a643" text:class-names="" text:cond-style-name=""><text:span text:style-name="a642" text:class-names="">64</text:span></text:p>
              </table:table-cell>
              <table:table-cell table:style-name="a647">
                <text:p text:style-name="a646" text:class-names="" text:cond-style-name=""><text:span text:style-name="a645" text:class-names="">384</text:span></text:p>
              </table:table-cell>
              <table:table-cell table:style-name="a650">
                <text:p text:style-name="a649" text:class-names="" text:cond-style-name=""><text:span text:style-name="a648" text:class-names="">4,096</text:span></text:p>
              </table:table-cell>
              <table:table-cell table:style-name="a653">
                <text:p text:style-name="a652" text:class-names="" text:cond-style-name=""><text:span text:style-name="a651" text:class-names="">18,446,744,073,709,551,616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7" draw:style-name="a654" draw:master-page-name="Master1-Layout2-obj-Title-and-Content" presentation:presentation-page-layout-name="Master1-PPL2" draw:id="Slide-262">
        <draw:frame draw:id="id74" presentation:style-name="a658" draw:name="Title 1" svg:x="0.58854in" svg:y="-0.07726in" svg:width="11.5in" svg:height="1.44965in" presentation:class="title" presentation:placeholder="false">
          <draw:text-box>
            <text:p text:style-name="a657" text:class-names="" text:cond-style-name=""><text:span text:style-name="a655" text:class-names="">Practicality of Each Growth Function</text:span><text:span text:style-name="a656" text:class-names=""/></text:p>
          </draw:text-box>
          <svg:title/>
          <svg:desc/>
        </draw:frame>
        <draw:frame draw:id="id75" presentation:style-name="a719" draw:name="Content Placeholder 2" svg:x="0.77604in" svg:y="1.45747in" svg:width="11.5in" svg:height="5.92535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O(log n):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Very efficient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Best for large datasets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Example:<text:s text:c="1"/></text:span><text:span text:style-name="a669" text:class-names="">Binary Search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O(n):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Efficient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Suitable for most applications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Example:<text:s text:c="1"/></text:span><text:span text:style-name="a682" text:class-names="">Linear Search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O(n log n):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Highly efficient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Best choice for sorting algorithms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4" text:class-names="">Example:</text:span><text:span text:style-name="a695" text:class-names=""><text:s text:c="1"/>Merge Sort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O(n²):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Slow for large datasets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Suitable only for small inputs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O(2ⁿ):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Extremely slow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Practical only for very small inputs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8" draw:style-name="a720" draw:master-page-name="Master1-Layout2-obj-Title-and-Content" presentation:presentation-page-layout-name="Master1-PPL2" draw:id="Slide-263">
        <draw:frame draw:id="id76" presentation:style-name="a724" draw:name="Title 1" svg:x="0.91667in" svg:y="0.39931in" svg:width="11.5in" svg:height="1.44965in" presentation:class="title" presentation:placeholder="false">
          <draw:text-box>
            <text:p text:style-name="a723" text:class-names="" text:cond-style-name=""><text:span text:style-name="a721" text:class-names="">Conclusion</text:span><text:span text:style-name="a722" text:class-names=""/></text:p>
          </draw:text-box>
          <svg:title/>
          <svg:desc/>
        </draw:frame>
        <draw:frame draw:id="id77" presentation:style-name="a746" draw:name="Content Placeholder 2" svg:x="0.91667in" svg:y="1.99653in" svg:width="11.5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Key Findings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Lower growth rates lead to faster algorithms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O(log n) is the most efficient among these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O(n) and O(n log n) are suitable for most real-world applications.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O(n²) becomes inefficient as input size increases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O(2ⁿ) grows exponentially and should be avoided for large-scale problems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-07-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-07-202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-07-202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-07-202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-07-202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-07-202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-07-202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-07-202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-07-202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8-07-202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8-07-202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8-07-202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utwek Reddy Lella</meta:initial-creator>
    <dc:creator>Rutwek Reddy Lella</dc:creator>
    <meta:creation-date>2026-07-17T09:10:06Z</meta:creation-date>
    <dc:date>2026-07-18T08:27:52Z</dc:date>
    <meta:editing-cycles>1</meta:editing-cycles>
    <meta:editing-duration>PT1035S</meta:editing-duration>
    <meta:document-statistic meta:paragraph-count="105" meta:word-count="396"/>
  </office:meta>
</office:document-meta>
</file>